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df7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ECUTIVE SUMMARY</text:p>
      <text:p text:style-name="Standard">Business Description</text:p>
      <text:p text:style-name="Standard">The name of the business will be EDENS AUT<text:span text:style-name="T1">0 </text:span>SPARES. The business will be dealing</text:p>
      <text:p text:style-name="Standard">with auto spare parts for vehicles spare parts and accessories, electrical and solar installation</text:p>
      <text:p text:style-name="Standard"><text:span text:style-name="T1">services</text:span> and all electrical accessories. The business will be located in <text:span text:style-name="T1">K</text:span>iirua MERU county.</text:p>
      <text:p text:style-name="Standard">The business will require a starting capital of K<text:span text:style-name="T1">SH</text:span> 600,000 to start and run its operations.</text:p>
      <text:p text:style-name="Standard">M<text:span text:style-name="T1">ARKETTING PLAN</text:span></text:p>
      <text:p text:style-name="Standard">The business will be targeting various customers according to their age, places where they</text:p>
      <text:p text:style-name="Standard">live and surrounding. The customers will be mainly individuals, households, institutions like</text:p>
      <text:p text:style-name="Standard">schools and churches. This is because in the area there will be growing churches, schools and</text:p>
      <text:p text:style-name="Standard">new structures which will need services of the business for their advancement.</text:p>
      <text:p text:style-name="Standard">They will choose to come to where the prices are fair and affordable.</text:p>
      <text:p text:style-name="Standard">The mostly targeted customers will be aged between 18 years to 55 years. As this range of</text:p>
      <text:p text:style-name="Standard">customers each and every day they will be setting up modern buildings which will require</text:p>
      <text:p text:style-name="Standard">modern installations and services.</text:p>
      <text:p text:style-name="Standard">Organization and Management Plan</text:p>
      <text:p text:style-name="Standard">This shows the business organization hierarchy from the top level to the lower level.</text:p>
      <text:p text:style-name="Standard">As the business will be stating up it will comprise of one manager, Technician, Sales Person.</text:p>
      <text:p text:style-name="Standard">As the business becomes accepted in the market workers will be recruited.</text:p>
      <text:p text:style-name="Standard">Operation and Production Plan</text:p>
      <text:p text:style-name="Standard">The business will be operated under rules and regulations which the employees will follow</text:p>
      <text:p text:style-name="Standard">to ensure good relation between the owner, employees and customers in general. The</text:p>
      <text:p text:style-name="Standard">business will have various tools and equipment which will ensure smooth flow of the</text:p>
      <text:p text:style-name="Standard">business. These are; shelves, tables, chairs, benches, <text:s/>Workstation extensions etc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30T13:20:19.966000000</meta:creation-date>
    <dc:date>2026-03-30T13:24:37.982000000</dc:date>
    <meta:editing-duration>PT4M18S</meta:editing-duration>
    <meta:editing-cycles>1</meta:editing-cycles>
    <meta:generator>Edit_Docx_PLUS/7.4.0.3$Windows_X86_64 LibreOffice_project/</meta:generator>
    <meta:document-statistic meta:table-count="0" meta:image-count="0" meta:object-count="0" meta:page-count="1" meta:paragraph-count="24" meta:word-count="269" meta:character-count="1695" meta:non-whitespace-character-count="1449"/>
  </office:meta>
</office:document-meta>
</file>